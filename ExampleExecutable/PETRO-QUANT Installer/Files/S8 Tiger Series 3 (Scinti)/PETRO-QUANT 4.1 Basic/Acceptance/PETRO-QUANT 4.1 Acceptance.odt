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B80000017348A2EA88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Fett" svg:font-family="'Arial Fett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6" style:family="table">
      <style:table-properties style:width="15.173cm" fo:margin-left="-0.182cm" fo:margin-top="0cm" fo:margin-bottom="0cm" table:align="left" style:writing-mode="page"/>
    </style:style>
    <style:style style:name="Table6.A" style:family="table-column">
      <style:table-column-properties style:column-width="4.482cm"/>
    </style:style>
    <style:style style:name="Table6.B" style:family="table-column">
      <style:table-column-properties style:column-width="5.546cm"/>
    </style:style>
    <style:style style:name="Table6.C" style:family="table-column">
      <style:table-column-properties style:column-width="5.14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7" style:family="table">
      <style:table-properties style:width="15.215cm" fo:margin-left="-0.182cm" fo:margin-top="0cm" fo:margin-bottom="0cm" table:align="left" style:writing-mode="page"/>
    </style:style>
    <style:style style:name="Table7.A" style:family="table-column">
      <style:table-column-properties style:column-width="4.463cm"/>
    </style:style>
    <style:style style:name="Table7.B" style:family="table-column">
      <style:table-column-properties style:column-width="5.567cm"/>
    </style:style>
    <style:style style:name="Table7.C" style:family="table-column">
      <style:table-column-properties style:column-width="5.18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8" style:family="table">
      <style:table-properties style:width="15.21cm" fo:margin-left="-0.182cm" fo:margin-top="0cm" fo:margin-bottom="0cm" table:align="left" style:writing-mode="page"/>
    </style:style>
    <style:style style:name="Table8.A" style:family="table-column">
      <style:table-column-properties style:column-width="4.491cm"/>
    </style:style>
    <style:style style:name="Table8.B" style:family="table-column">
      <style:table-column-properties style:column-width="5.517cm"/>
    </style:style>
    <style:style style:name="Table8.C" style:family="table-column">
      <style:table-column-properties style:column-width="5.20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9" style:family="table">
      <style:table-properties style:width="15.215cm" fo:margin-left="-0.182cm" fo:margin-top="0cm" fo:margin-bottom="0cm" table:align="left" style:writing-mode="page"/>
    </style:style>
    <style:style style:name="Table9.A" style:family="table-column">
      <style:table-column-properties style:column-width="4.463cm"/>
    </style:style>
    <style:style style:name="Table9.B" style:family="table-column">
      <style:table-column-properties style:column-width="5.567cm"/>
    </style:style>
    <style:style style:name="Table9.C" style:family="table-column">
      <style:table-column-properties style:column-width="5.18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2">
      <style:text-properties style:font-name="Arial1"/>
    </style:style>
    <style:style style:name="P2" style:family="paragraph" style:parent-style-name="Standard">
      <style:paragraph-properties fo:margin-left="0cm" fo:margin-right="0cm" fo:margin-top="0cm" fo:margin-bottom="0.106cm" style:contextual-spacing="false" fo:text-indent="0cm" style:auto-text-indent="false" style:writing-mode="lr-tb"/>
    </style:style>
    <style:style style:name="P3" style:family="paragraph" style:parent-style-name="Standard" style:list-style-name="WWNum1a">
      <style:paragraph-properties fo:margin-left="1.27cm" fo:margin-right="0cm" fo:margin-top="0cm" fo:margin-bottom="0.106cm" style:contextual-spacing="false" fo:orphans="2" fo:widows="2" fo:text-indent="-0.635cm" style:auto-text-indent="false" style:writing-mode="lr-tb"/>
    </style:style>
    <style:style style:name="P4" style:family="paragraph" style:parent-style-name="Standard" style:list-style-name="WWNum1a">
      <style:paragraph-properties fo:margin-left="1.27cm" fo:margin-right="0cm" fo:margin-top="0cm" fo:margin-bottom="0.106cm" style:contextual-spacing="false" fo:orphans="2" fo:widows="2" fo:text-indent="-0.635cm" style:auto-text-indent="false" style:writing-mode="lr-tb"/>
      <style:text-properties officeooo:paragraph-rsid="002da62f"/>
    </style:style>
    <style:style style:name="P5" style:family="paragraph" style:parent-style-name="b_5f_body">
      <style:paragraph-properties fo:line-height="100%"/>
      <style:text-properties fo:color="#000000" loext:opacity="100%" fo:font-size="10pt" fo:language="en" fo:country="GB" officeooo:rsid="002da62f" officeooo:paragraph-rsid="002da62f" style:font-size-asian="10pt" style:font-size-complex="10pt"/>
    </style:style>
    <style:style style:name="P6" style:family="paragraph" style:parent-style-name="b_5f_body">
      <style:paragraph-properties fo:line-height="100%"/>
      <style:text-properties fo:color="#000000" loext:opacity="100%" fo:font-size="10pt" fo:language="en" fo:country="GB" officeooo:rsid="002f0019" officeooo:paragraph-rsid="002f0019" style:font-size-asian="10pt" style:font-size-complex="10pt"/>
    </style:style>
    <style:style style:name="P7" style:family="paragraph" style:parent-style-name="b_5f_body">
      <style:paragraph-properties fo:line-height="100%"/>
      <style:text-properties fo:color="#006cb0" loext:opacity="100%" style:font-name="Arial Fett" fo:font-size="14pt" fo:font-weight="bold" officeooo:paragraph-rsid="002f0019" style:font-size-asian="14pt" style:font-weight-asian="bold"/>
    </style:style>
    <style:style style:name="P8" style:family="paragraph" style:parent-style-name="Heading_20_2">
      <style:paragraph-properties fo:margin-top="0cm" fo:margin-bottom="0.212cm" style:contextual-spacing="false" fo:break-before="page"/>
      <style:text-properties officeooo:paragraph-rsid="002f0019"/>
    </style:style>
    <style:style style:name="P9" style:family="paragraph" style:parent-style-name="Standard">
      <style:paragraph-properties fo:text-align="center" style:justify-single-word="false" fo:orphans="2" fo:widows="2">
        <style:tab-stops/>
      </style:paragraph-properties>
      <style:text-properties officeooo:paragraph-rsid="0038f458"/>
    </style:style>
    <style:style style:name="P10" style:family="paragraph" style:parent-style-name="Standard">
      <style:paragraph-properties fo:margin-top="0cm" fo:margin-bottom="0.212cm" style:contextual-spacing="false"/>
      <style:text-properties officeooo:paragraph-rsid="0038f458"/>
    </style:style>
    <style:style style:name="P11" style:family="paragraph" style:parent-style-name="Standard">
      <style:paragraph-properties fo:margin-top="0cm" fo:margin-bottom="0.212cm" style:contextual-spacing="false"/>
      <style:text-properties officeooo:paragraph-rsid="002f0019"/>
    </style:style>
    <style:style style:name="P12" style:family="paragraph" style:parent-style-name="Standard">
      <style:paragraph-properties fo:margin-top="0cm" fo:margin-bottom="0.212cm" style:contextual-spacing="false"/>
      <style:text-properties fo:language="de" fo:country="DE" officeooo:rsid="002f0019" officeooo:paragraph-rsid="002f0019" style:font-name-asian="SimSun"/>
    </style:style>
    <style:style style:name="P13" style:family="paragraph" style:parent-style-name="Heading_20_2">
      <style:paragraph-properties fo:margin-top="0cm" fo:margin-bottom="0.212cm" style:contextual-spacing="false"/>
      <style:text-properties style:font-name="Arial1" officeooo:paragraph-rsid="002f0019"/>
    </style:style>
    <style:style style:name="P14" style:family="paragraph" style:parent-style-name="Heading_20_2">
      <style:paragraph-properties fo:margin-top="0cm" fo:margin-bottom="0.212cm" style:contextual-spacing="false"/>
      <style:text-properties officeooo:paragraph-rsid="0038f458"/>
    </style:style>
    <style:style style:name="P15" style:family="paragraph" style:parent-style-name="Heading_20_2">
      <style:paragraph-properties fo:margin-top="0cm" fo:margin-bottom="0.212cm" style:contextual-spacing="false"/>
      <style:text-properties style:font-name="Arial1" fo:language="en" fo:country="US" officeooo:rsid="002f0019" officeooo:paragraph-rsid="0038f458"/>
    </style:style>
    <style:style style:name="P16" style:family="paragraph" style:parent-style-name="Heading_20_2">
      <style:paragraph-properties fo:margin-top="0cm" fo:margin-bottom="0.212cm" style:contextual-spacing="false"/>
      <style:text-properties style:font-name="Arial1" officeooo:paragraph-rsid="0038f458"/>
    </style:style>
    <style:style style:name="P17" style:family="paragraph" style:parent-style-name="Standard">
      <style:paragraph-properties fo:margin-right="-0.503cm"/>
      <style:text-properties style:font-name="Arial" fo:language="en" fo:country="US" officeooo:paragraph-rsid="0038f458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>
      <loext:graphic-properties draw:fill="none"/>
      <style:paragraph-properties fo:text-align="left"/>
      <style:text-properties fo:color="#000000" loext:opacity="100%" fo:font-size="18pt"/>
    </style:style>
    <style:style style:name="T1" style:family="text">
      <style:text-properties fo:language="en" fo:country="GB"/>
    </style:style>
    <style:style style:name="T2" style:family="text">
      <style:text-properties fo:language="en" fo:country="US" officeooo:rsid="000e460c"/>
    </style:style>
    <style:style style:name="T3" style:family="text">
      <style:text-properties fo:language="en" fo:country="US"/>
    </style:style>
    <style:style style:name="T4" style:family="text">
      <style:text-properties fo:language="de" fo:country="DE" officeooo:rsid="002da62f" style:font-name-asian="SimSun"/>
    </style:style>
    <style:style style:name="T5" style:family="text">
      <style:text-properties fo:language="en" fo:country="GB" officeooo:rsid="002da62f"/>
    </style:style>
    <style:style style:name="T6" style:family="text">
      <style:text-properties fo:color="#000000" loext:opacity="100%" style:font-name="Arial" fo:language="en" fo:country="US" style:font-family-complex="Calibri" style:font-family-generic-complex="system" style:font-pitch-complex="variable"/>
    </style:style>
    <style:style style:name="T7" style:family="text">
      <style:text-properties fo:color="#000000" loext:opacity="100%" style:font-name="Arial" fo:language="en" fo:country="US" officeooo:rsid="002da62f" style:font-family-complex="Calibri" style:font-family-generic-complex="system" style:font-pitch-complex="variable"/>
    </style:style>
    <style:style style:name="T8" style:family="text">
      <style:text-properties style:font-name="Arial" fo:language="en" fo:country="US" style:font-family-complex="Calibri" style:font-family-generic-complex="system" style:font-pitch-complex="variable"/>
    </style:style>
    <style:style style:name="T9" style:family="text">
      <style:text-properties style:text-position="0% 100%" style:font-name="Arial" fo:language="en" fo:country="US" style:font-family-complex="Calibri" style:font-family-generic-complex="system" style:font-pitch-complex="variable"/>
    </style:style>
    <style:style style:name="T10" style:family="text">
      <style:text-properties style:font-name="Arial" fo:language="en" fo:country="US" officeooo:rsid="002da62f" style:font-family-complex="Calibri" style:font-family-generic-complex="system" style:font-pitch-complex="variable"/>
    </style:style>
    <style:style style:name="T11" style:family="text">
      <style:text-properties officeooo:rsid="002f0019"/>
    </style:style>
    <style:style style:name="T12" style:family="text">
      <style:text-properties officeooo:rsid="003efced"/>
    </style:style>
    <style:style style:name="T13" style:family="text">
      <style:text-properties officeooo:rsid="0040cc0a"/>
    </style:style>
    <style:style style:name="T14" style:family="text">
      <style:text-properties officeooo:rsid="0042c1ad"/>
    </style:style>
    <style:style style:name="T15" style:family="text">
      <style:text-properties fo:language="en" fo:country="GB" style:font-name-asian="SimSun"/>
    </style:style>
    <style:style style:name="T16" style:family="text">
      <style:text-properties style:font-name="Arial1" fo:language="en" fo:country="US" officeooo:rsid="0009a8ff"/>
    </style:style>
    <style:style style:name="T17" style:family="text">
      <style:text-properties style:font-name="Arial1" fo:language="en" fo:country="US"/>
    </style:style>
    <style:style style:name="T18" style:family="text">
      <style:text-properties style:font-name="Arial1" fo:language="en" fo:country="US" officeooo:rsid="002f0019"/>
    </style:style>
    <style:style style:name="T19" style:family="text">
      <style:text-properties style:font-name="Arial1" fo:language="de" fo:country="DE" officeooo:rsid="002f0019" style:font-name-asian="SimSun"/>
    </style:style>
    <style:style style:name="T20" style:family="text">
      <style:text-properties fo:language="de" fo:country="DE"/>
    </style:style>
    <style:style style:name="T21" style:family="text">
      <style:text-properties style:use-window-font-color="true" loext:opacity="0%" fo:language="de" fo:country="DE" style:language-asian="de" style:country-asian="DE"/>
    </style:style>
    <style:style style:name="T22" style:family="text">
      <style:text-properties style:use-window-font-color="true" loext:opacity="0%"/>
    </style:style>
    <style:style style:name="T23" style:family="text">
      <style:text-properties fo:language="de" fo:country="DE" officeooo:rsid="002f0019" style:font-name-asian="SimSun"/>
    </style:style>
    <style:style style:name="T24" style:family="text">
      <style:text-properties fo:language="en" fo:country="US" officeooo:rsid="002f0019"/>
    </style:style>
    <style:style style:name="T25" style:family="text">
      <style:text-properties fo:language="en" fo:country="GB" officeooo:rsid="002a3ea1"/>
    </style:style>
    <style:style style:name="T26" style:family="text">
      <style:text-properties style:font-name="Arial" fo:language="en" fo:country="GB"/>
    </style:style>
    <style:style style:name="T27" style:family="text">
      <style:text-properties fo:color="#000000" loext:opacity="100%" style:font-name="Calibri" fo:font-size="8pt" style:font-size-asian="8pt" style:font-family-complex="Calibri" style:font-family-generic-complex="system" style:font-pitch-complex="variable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18cm" draw:fill="none" loext:fill-use-slide-background="false" draw:textarea-vertical-align="bottom" draw:auto-grow-height="false" fo:min-height="0.76cm" fo:min-width="20.496cm" fo:padding-top="0cm" fo:padding-bottom="0cm" fo:padding-left="0.254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loext:fill-use-slide-background="false" draw:textarea-vertical-align="bottom" draw:auto-grow-height="false" fo:min-height="0.76cm" fo:min-width="20.496cm" fo:padding-top="0cm" fo:padding-bottom="0cm" fo:padding-left="0.254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"/>
      </text:sequence-decls>
      <text:user-field-decls>
        <text:user-field-decl office:value-type="string" office:string-value="[PAR:Sample ID:{?*}]" text:name="PAR:Sample ID:{?*}"/>
        <text:user-field-decl office:value-type="string" office:string-value="[PAR:End Time:{?*}]" text:name="PAR:End Time:{?*}"/>
        <text:user-field-decl office:value-type="string" office:string-value="[PAR:Application:{?*}]" text:name="PAR:Application:{?*}"/>
        <text:user-field-decl office:value-type="string" office:string-value="[PAR:Na2O (%):{?*}]" text:name="PAR:Na2O (%):{?*}"/>
        <text:user-field-decl office:value-type="string" office:string-value="[PAR:Al2O3 (%):{?*}]" text:name="PAR:Al2O3 (%):{?*}"/>
        <text:user-field-decl office:value-type="string" office:string-value="[PAR:SiO2 (%):{?*}]" text:name="PAR:SiO2 (%):{?*}"/>
        <text:user-field-decl office:value-type="string" office:string-value="[PAR:CaO (%):{?*}]" text:name="PAR:CaO (%):{?*}"/>
        <text:user-field-decl office:value-type="string" office:string-value="[PAR:MnO (%):{?*}]" text:name="PAR:MnO (%):{?*}"/>
        <text:user-field-decl office:value-type="string" office:string-value="[PAR:Sb2O3 (%):{?*}]" text:name="PAR:Sb2O3 (%):{?*}"/>
        <text:user-field-decl office:value-type="string" office:string-value="[PAR:Sample ID:{?*2}]" text:name="PAR:Sample ID:{?*2}"/>
        <text:user-field-decl office:value-type="string" office:string-value="[PAR:End Time:{?*2}]" text:name="PAR:End Time:{?*2}"/>
        <text:user-field-decl office:value-type="string" office:string-value="[PAR:Application:{?*2}]" text:name="PAR:Application:{?*2}"/>
        <text:user-field-decl office:value-type="string" office:string-value="[PAR:Na (PPM):{?*2}]" text:name="PAR:Na (PPM):{?*2}"/>
        <text:user-field-decl office:value-type="string" office:string-value="[PAR:Na (PPM):{?*}]" text:name="PAR:Na (PPM):{?*}"/>
        <text:user-field-decl office:value-type="string" office:string-value="[PAR:Mg (PPM):{?*2}]" text:name="PAR:Mg (PPM):{?*2}"/>
        <text:user-field-decl office:value-type="string" office:string-value="[PAR:Mg (PPM):{?*}]" text:name="PAR:Mg (PPM):{?*}"/>
        <text:user-field-decl office:value-type="string" office:string-value="[PAR:Al (PPM):{?*2}]" text:name="PAR:Al (PPM):{?*2}"/>
        <text:user-field-decl office:value-type="string" office:string-value="[PAR:Al (PPM):{?*}]" text:name="PAR:Al (PPM):{?*}"/>
        <text:user-field-decl office:value-type="string" office:string-value="[PAR:Si (PPM):{?*2}]" text:name="PAR:Si (PPM):{?*2}"/>
        <text:user-field-decl office:value-type="string" office:string-value="[PAR:Si (PPM):{?*}]" text:name="PAR:Si (PPM):{?*}"/>
        <text:user-field-decl office:value-type="string" office:string-value="[PAR:P (PPM):{?*2}]" text:name="PAR:P (PPM):{?*2}"/>
        <text:user-field-decl office:value-type="string" office:string-value="[PAR:P (PPM):{?*}]" text:name="PAR:P (PPM):{?*}"/>
        <text:user-field-decl office:value-type="string" office:string-value="[PAR:S (%):{?*2}]" text:name="PAR:S (%):{?*2}"/>
        <text:user-field-decl office:value-type="string" office:string-value="[PAR:S (%):{?*}]" text:name="PAR:S (%):{?*}"/>
        <text:user-field-decl office:value-type="string" office:string-value="[PAR:Cl (PPM):{?*2}]" text:name="PAR:Cl (PPM):{?*2}"/>
        <text:user-field-decl office:value-type="string" office:string-value="[PAR:Cl (PPM):{?*}]" text:name="PAR:Cl (PPM):{?*}"/>
        <text:user-field-decl office:value-type="string" office:string-value="[PAR:K (PPM):{?*2}]" text:name="PAR:K (PPM):{?*2}"/>
        <text:user-field-decl office:value-type="string" office:string-value="[PAR:K (PPM):{?*}]" text:name="PAR:K (PPM):{?*}"/>
        <text:user-field-decl office:value-type="string" office:string-value="[PAR:Ca (PPM):{?*2}]" text:name="PAR:Ca (PPM):{?*2}"/>
        <text:user-field-decl office:value-type="string" office:string-value="[PAR:Ca (PPM):{?*}]" text:name="PAR:Ca (PPM):{?*}"/>
        <text:user-field-decl office:value-type="string" office:string-value="[PAR:Ti (PPM):{?*2}]" text:name="PAR:Ti (PPM):{?*2}"/>
        <text:user-field-decl office:value-type="string" office:string-value="[PAR:Ti (PPM):{?*}]" text:name="PAR:Ti (PPM):{?*}"/>
        <text:user-field-decl office:value-type="string" office:string-value="[PAR:V (PPM):{?*2}]" text:name="PAR:V (PPM):{?*2}"/>
        <text:user-field-decl office:value-type="string" office:string-value="[PAR:V (PPM):{?*}]" text:name="PAR:V (PPM):{?*}"/>
        <text:user-field-decl office:value-type="string" office:string-value="[PAR:Cr (PPM):{?*2}]" text:name="PAR:Cr (PPM):{?*2}"/>
        <text:user-field-decl office:value-type="string" office:string-value="[PAR:Cr (PPM):{?*}]" text:name="PAR:Cr (PPM):{?*}"/>
        <text:user-field-decl office:value-type="string" office:string-value="[PAR:Mn (PPM):{?*2}]" text:name="PAR:Mn (PPM):{?*2}"/>
        <text:user-field-decl office:value-type="string" office:string-value="[PAR:Mn (PPM):{?*}]" text:name="PAR:Mn (PPM):{?*}"/>
        <text:user-field-decl office:value-type="string" office:string-value="[PAR:Fe (PPM):{?*2}]" text:name="PAR:Fe (PPM):{?*2}"/>
        <text:user-field-decl office:value-type="string" office:string-value="[PAR:Fe (PPM):{?*}]" text:name="PAR:Fe (PPM):{?*}"/>
        <text:user-field-decl office:value-type="string" office:string-value="[PAR:Co (PPM):{?*2}]" text:name="PAR:Co (PPM):{?*2}"/>
        <text:user-field-decl office:value-type="string" office:string-value="[PAR:Co (PPM):{?*}]" text:name="PAR:Co (PPM):{?*}"/>
        <text:user-field-decl office:value-type="string" office:string-value="[PAR:Ni (PPM):{?*2}]" text:name="PAR:Ni (PPM):{?*2}"/>
        <text:user-field-decl office:value-type="string" office:string-value="[PAR:Ni (PPM):{?*}]" text:name="PAR:Ni (PPM):{?*}"/>
        <text:user-field-decl office:value-type="string" office:string-value="[PAR:Cu (PPM):{?*2}]" text:name="PAR:Cu (PPM):{?*2}"/>
        <text:user-field-decl office:value-type="string" office:string-value="[PAR:Cu (PPM):{?*}]" text:name="PAR:Cu (PPM):{?*}"/>
        <text:user-field-decl office:value-type="string" office:string-value="[PAR:Zn (PPM):{?*2}]" text:name="PAR:Zn (PPM):{?*2}"/>
        <text:user-field-decl office:value-type="string" office:string-value="[PAR:Zn (PPM):{?*}]" text:name="PAR:Zn (PPM):{?*}"/>
        <text:user-field-decl office:value-type="string" office:string-value="[PAR:As (PPM):{?*2}]" text:name="PAR:As (PPM):{?*2}"/>
        <text:user-field-decl office:value-type="string" office:string-value="[PAR:As (PPM):{?*}]" text:name="PAR:As (PPM):{?*}"/>
        <text:user-field-decl office:value-type="string" office:string-value="[PAR:Br (PPM):{?*2}]" text:name="PAR:Br (PPM):{?*2}"/>
        <text:user-field-decl office:value-type="string" office:string-value="[PAR:Br (PPM):{?*}]" text:name="PAR:Br (PPM):{?*}"/>
        <text:user-field-decl office:value-type="string" office:string-value="[PAR:Zr (PPM):{?*2}]" text:name="PAR:Zr (PPM):{?*2}"/>
        <text:user-field-decl office:value-type="string" office:string-value="[PAR:Zr (PPM):{?*}]" text:name="PAR:Zr (PPM):{?*}"/>
        <text:user-field-decl office:value-type="string" office:string-value="[PAR:Mo (PPM):{?*2}]" text:name="PAR:Mo (PPM):{?*2}"/>
        <text:user-field-decl office:value-type="string" office:string-value="[PAR:Mo (PPM):{?*}]" text:name="PAR:Mo (PPM):{?*}"/>
        <text:user-field-decl office:value-type="string" office:string-value="[PAR:Ag (PPM):{?*2}]" text:name="PAR:Ag (PPM):{?*2}"/>
        <text:user-field-decl office:value-type="string" office:string-value="[PAR:Ag (PPM):{?*}]" text:name="PAR:Ag (PPM):{?*}"/>
        <text:user-field-decl office:value-type="string" office:string-value="[PAR:Cd (PPM):{?*2}]" text:name="PAR:Cd (PPM):{?*2}"/>
        <text:user-field-decl office:value-type="string" office:string-value="[PAR:Cd (PPM):{?*}]" text:name="PAR:Cd (PPM):{?*}"/>
        <text:user-field-decl office:value-type="string" office:string-value="[PAR:In (PPM):{?*2}]" text:name="PAR:In (PPM):{?*2}"/>
        <text:user-field-decl office:value-type="string" office:string-value="[PAR:In (PPM):{?*}]" text:name="PAR:In (PPM):{?*}"/>
        <text:user-field-decl office:value-type="string" office:string-value="[PAR:Sn (PPM):{?*2}]" text:name="PAR:Sn (PPM):{?*2}"/>
        <text:user-field-decl office:value-type="string" office:string-value="[PAR:Sn (PPM):{?*}]" text:name="PAR:Sn (PPM):{?*}"/>
        <text:user-field-decl office:value-type="string" office:string-value="[PAR:Sb (PPM):{?*2}]" text:name="PAR:Sb (PPM):{?*2}"/>
        <text:user-field-decl office:value-type="string" office:string-value="[PAR:Sb (PPM):{?*}]" text:name="PAR:Sb (PPM):{?*}"/>
        <text:user-field-decl office:value-type="string" office:string-value="[PAR:Ba (PPM):{?*2}]" text:name="PAR:Ba (PPM):{?*2}"/>
        <text:user-field-decl office:value-type="string" office:string-value="[PAR:Ba (PPM):{?*}]" text:name="PAR:Ba (PPM):{?*}"/>
        <text:user-field-decl office:value-type="string" office:string-value="[PAR:W (PPM):{?*2}]" text:name="PAR:W (PPM):{?*2}"/>
        <text:user-field-decl office:value-type="string" office:string-value="[PAR:W (PPM):{?*}]" text:name="PAR:W (PPM):{?*}"/>
        <text:user-field-decl office:value-type="string" office:string-value="[PAR:Tl (PPM):{?*2}]" text:name="PAR:Tl (PPM):{?*2}"/>
        <text:user-field-decl office:value-type="string" office:string-value="[PAR:Tl (PPM):{?*}]" text:name="PAR:Tl (PPM):{?*}"/>
        <text:user-field-decl office:value-type="string" office:string-value="[PAR:Pb (PPM):{?*2}]" text:name="PAR:Pb (PPM):{?*2}"/>
        <text:user-field-decl office:value-type="string" office:string-value="[PAR:Pb (PPM):{?*}]" text:name="PAR:Pb (PPM):{?*}"/>
        <text:user-field-decl office:value-type="string" office:string-value="[PAR:Bi (PPM):{?*2}]" text:name="PAR:Bi (PPM):{?*2}"/>
        <text:user-field-decl office:value-type="string" office:string-value="[PAR:Bi (PPM):{?*}]" text:name="PAR:Bi (PPM):{?*}"/>
      </text:user-field-decls>
      <text:h text:style-name="Heading_20_1" text:outline-level="1" loext:marker-style-name="T1"><text:span text:style-name="T2">2</text:span><text:span text:style-name="T3"><text:tab/></text:span><text:span text:style-name="T4">Onsite Validation</text:span></text:h>
      <text:h text:style-name="P1" text:outline-level="2"><text:span text:style-name="T2">2.1</text:span><text:span text:style-name="T3"><text:tab/></text:span><text:span text:style-name="T5">Procedure</text:span></text:h>
      <text:p text:style-name="P2" loext:marker-style-name="T3"><text:span text:style-name="T6">To validate PETRO-QUANT 4.1, four quality control (QC) samples are measured: QC Paraffin, QC Con S21+K+Sb 100ppm, QC XRS1 and QC XRS2. </text:span><text:span text:style-name="T7">All control samples should be measured twice, once with PETRO-QUANT and once with PETRO-QUANT Be.</text:span><text:span text:style-name="T6"> To carry out the measurements:</text:span></text:p>
      <text:list text:style-name="WWNum1a">
        <text:list-item>
          <text:p text:style-name="P3" loext:marker-style-name="T3"><text:span text:style-name="T8">Go to the LOADER and select Control specimen. After selecting the PETRO-QUANT method, the four control samples should appear automatically.</text:span><text:span text:style-name="T8"/></text:p>
        </text:list-item>
        <text:list-item>
          <text:p text:style-name="P4" loext:marker-style-name="T3"><text:span text:style-name="T8">For each sample, prepare a liquid cup with 4µm Prolene® film. Weigh 7.0±0.1g before each single measurement, place cup 30s on a non-contaminating underlay (e.g. weighing paper) for leakage testing, put liquid cup into sample holder with 34 mm aperture, place it on the respective loader position and start measurement.</text:span></text:p>
        </text:list-item>
        <text:list-item>
          <text:p text:style-name="P4" loext:marker-style-name="T3"><text:span text:style-name="T8">Go to the Results Manager and check </text:span><text:span text:style-name="T9">that</text:span><text:span text:style-name="T8"> all applicable elements are within the limits (indicated by green colour) for each sample. In case of mismatch refer to Appendix 2.</text:span></text:p>
        </text:list-item>
        <text:list-item>
          <text:p text:style-name="P4" loext:marker-style-name="T3"><text:span text:style-name="T10">Go back to the Control specimen tab in the LOADER. Select PETRO-QUANT Be. The four control samples should automatically reappear for the Be method. Repeat steps 2 and 3 for the PETRO-QUANT Be application (Note: some limits are set differently for the Be version).</text:span></text:p>
        </text:list-item>
      </text:list>
      <text:p text:style-name="P5">After measuring all Control Samples, fill out the Acceptance tables for each control sample on the following pages. In order to do this, go to Results Manager <text:span text:style-name="T11">and click Results Manager – Open View. For each </text:span><text:span text:style-name="T12">of the four control samples</text:span><text:span text:style-name="T11">, a View </text:span><text:span text:style-name="T12">specification</text:span><text:span text:style-name="T11"> is available that will show the respective samples and generate reports. </text:span><text:span text:style-name="T12">For example, for</text:span><text:span text:style-name="T11"> the “QC Paraffin” measurement, select the View “PETRO-QUANT</text:span><text:span text:style-name="T12">_</text:span><text:span text:style-name="T11">Q</text:span><text:span text:style-name="T12">C</text:span><text:span text:style-name="T11">Paraffin”.</text:span></text:p>
      <text:p text:style-name="P5"><text:span text:style-name="T11">All measurement of the control sample are now displayed. </text:span>Select your onsite validation measurement <text:span text:style-name="T13">of QC Paraffin</text:span> in the sample list. Once the sample <text:span text:style-name="T14">is </text:span>selected, the report table to the right is automatically filled. <text:span text:style-name="T11">Copy the table and r</text:span>eplace the dummy table in <text:span text:style-name="T11">section 2.2 with your results. </text:span></text:p>
      <text:p text:style-name="P6">Repeat for the other three measurements <text:span text:style-name="T12">and the tables </text:span>in sections 2.3 – 2.5.</text:p>
      <text:p text:style-name="P7"><text:span text:style-name="T15"/></text:p>
      <text:h text:style-name="P8" text:outline-level="2"><text:span text:style-name="T16">2</text:span><text:span text:style-name="T17">.</text:span><text:span text:style-name="T18">2<text:tab/></text:span><text:span text:style-name="T19">QC Paraffin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" loext:marker-style-name="T20"><text:span text:style-name="T21">Sample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Specification Range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Date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Calibration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Na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16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Mg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11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Al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6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Si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6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P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S (%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0.000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Cl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6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K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Ca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Ti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V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Cr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Mn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Fe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Co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Ni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Cu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Zn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As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6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Br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Zr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Mo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Ag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11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Cd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11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In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6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Sn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6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Sb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6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Ba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6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W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Tl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Pb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  <table:table-row table:style-name="Table6.1">
          <table:table-cell table:style-name="Table6.A1" office:value-type="string">
            <text:p text:style-name="P9" loext:marker-style-name="T20"><text:span text:style-name="T21">Bi (PPM)</text:span></text:p>
          </table:table-cell>
          <table:table-cell table:style-name="Table6.A1" office:value-type="string">
            <text:p text:style-name="P9"><text:span text:style-name="T22"/></text:p>
          </table:table-cell>
          <table:table-cell table:style-name="Table6.A1" office:value-type="string">
            <text:p text:style-name="P9" loext:marker-style-name="T20"><text:span text:style-name="T21">&lt; 4</text:span></text:p>
          </table:table-cell>
        </table:table-row>
      </table:table>
      <text:p text:style-name="P10" loext:marker-style-name="T1"><text:span text:style-name="T23"/></text:p>
      <text:p text:style-name="P11" loext:marker-style-name="T1"><text:span text:style-name="T23"/></text:p>
      <text:p text:style-name="P11" loext:marker-style-name="T1"><text:span text:style-name="T23"/></text:p>
      <text:p text:style-name="P11" loext:marker-style-name="T1"><text:span text:style-name="T23"/></text:p>
      <text:p text:style-name="P11" loext:marker-style-name="T1"><text:span text:style-name="T23"/></text:p>
      <text:p text:style-name="P11" loext:marker-style-name="T1"><text:span text:style-name="T23"/></text:p>
      <text:p text:style-name="P11" loext:marker-style-name="T1"><text:span text:style-name="T23"/></text:p>
      <text:p text:style-name="P11" loext:marker-style-name="T1"><text:span text:style-name="T23"/></text:p>
      <text:p text:style-name="P11" loext:marker-style-name="T1"><text:span text:style-name="T23"/></text:p>
      <text:p text:style-name="P11" loext:marker-style-name="T1"><text:span text:style-name="T23"/></text:p>
      <text:p text:style-name="P12" loext:marker-style-name="T1"/>
      <text:p text:style-name="P12" loext:marker-style-name="T1"/>
      <text:p text:style-name="P11" loext:marker-style-name="T1"><text:span text:style-name="T23"/></text:p>
      <text:h text:style-name="P13" text:outline-level="2"><text:soft-page-break/><text:span text:style-name="T24">2.3<text:tab/></text:span><text:span text:style-name="T25">QC Conostan S21+K+Sb</text:span><text:span text:style-name="T24"> 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9" loext:marker-style-name="T20"><text:span text:style-name="T21">Sample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Specification Range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Date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Calibration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Na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0 - 120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Mg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5 - 115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Al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Si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P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K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Ca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Ti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V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Cr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Mn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Fe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Ni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Cu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Zn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Mo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Ag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4 - 116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Cd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4 - 116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Sn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Sb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Ba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  <table:table-row table:style-name="Table7.1">
          <table:table-cell table:style-name="Table7.A1" office:value-type="string">
            <text:p text:style-name="P9" loext:marker-style-name="T20"><text:span text:style-name="T21">Pb (PPM)</text:span></text:p>
          </table:table-cell>
          <table:table-cell table:style-name="Table7.A1" office:value-type="string">
            <text:p text:style-name="P9"><text:span text:style-name="T22"/></text:p>
          </table:table-cell>
          <table:table-cell table:style-name="Table7.A1" office:value-type="string">
            <text:p text:style-name="P9" loext:marker-style-name="T20"><text:span text:style-name="T21">89 - 111</text:span></text:p>
          </table:table-cell>
        </table:table-row>
      </table:table>
      <text:h text:style-name="P14" text:outline-level="2" loext:marker-style-name="T1"><text:span text:style-name="T24"/></text:h>
      <text:h text:style-name="P15" text:outline-level="2">2.4<text:tab/>QC XRS1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9" loext:marker-style-name="T20"><text:span text:style-name="T21">Sample</text:span></text:p>
          </table:table-cell>
          <table:table-cell table:style-name="Table8.A1" office:value-type="string">
            <text:p text:style-name="P9"><text:span text:style-name="T22"/></text:p>
          </table:table-cell>
          <table:table-cell table:style-name="Table8.A1" office:value-type="string">
            <text:p text:style-name="P9" loext:marker-style-name="T20"><text:span text:style-name="T21">Specification Range</text:span></text:p>
          </table:table-cell>
        </table:table-row>
        <table:table-row table:style-name="Table8.1">
          <table:table-cell table:style-name="Table8.A1" office:value-type="string">
            <text:p text:style-name="P9" loext:marker-style-name="T20"><text:span text:style-name="T21">Date</text:span></text:p>
          </table:table-cell>
          <table:table-cell table:style-name="Table8.A1" office:value-type="string">
            <text:p text:style-name="P9"><text:span text:style-name="T22"/></text:p>
          </table:table-cell>
          <table:table-cell table:style-name="Table8.A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9" loext:marker-style-name="T20"><text:span text:style-name="T21">Calibration</text:span></text:p>
          </table:table-cell>
          <table:table-cell table:style-name="Table8.A1" office:value-type="string">
            <text:p text:style-name="P9"><text:span text:style-name="T22"/></text:p>
          </table:table-cell>
          <table:table-cell table:style-name="Table8.A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9" loext:marker-style-name="T20"><text:span text:style-name="T21">S (%)</text:span></text:p>
          </table:table-cell>
          <table:table-cell table:style-name="Table8.A1" office:value-type="string">
            <text:p text:style-name="P9"><text:span text:style-name="T22"/></text:p>
          </table:table-cell>
          <table:table-cell table:style-name="Table8.A1" office:value-type="string">
            <text:p text:style-name="P9" loext:marker-style-name="T20"><text:span text:style-name="T21">0.0089 - 0.0111</text:span></text:p>
          </table:table-cell>
        </table:table-row>
        <table:table-row table:style-name="Table8.1">
          <table:table-cell table:style-name="Table8.A1" office:value-type="string">
            <text:p text:style-name="P9" loext:marker-style-name="T20"><text:span text:style-name="T21">Cl (PPM)</text:span></text:p>
          </table:table-cell>
          <table:table-cell table:style-name="Table8.A1" office:value-type="string">
            <text:p text:style-name="P9"><text:span text:style-name="T22"/></text:p>
          </table:table-cell>
          <table:table-cell table:style-name="Table8.A1" office:value-type="string">
            <text:p text:style-name="P9" loext:marker-style-name="T20"><text:span text:style-name="T21">89 - 111</text:span></text:p>
          </table:table-cell>
        </table:table-row>
        <table:table-row table:style-name="Table8.1">
          <table:table-cell table:style-name="Table8.A1" office:value-type="string">
            <text:p text:style-name="P9" loext:marker-style-name="T20"><text:span text:style-name="T21">Br (PPM)</text:span></text:p>
          </table:table-cell>
          <table:table-cell table:style-name="Table8.A1" office:value-type="string">
            <text:p text:style-name="P9"><text:span text:style-name="T22"/></text:p>
          </table:table-cell>
          <table:table-cell table:style-name="Table8.A1" office:value-type="string">
            <text:p text:style-name="P9" loext:marker-style-name="T20"><text:span text:style-name="T21">89 - 111</text:span></text:p>
          </table:table-cell>
        </table:table-row>
        <table:table-row table:style-name="Table8.1">
          <table:table-cell table:style-name="Table8.A1" office:value-type="string">
            <text:p text:style-name="P9" loext:marker-style-name="T20"><text:span text:style-name="T21">Zr (PPM)</text:span></text:p>
          </table:table-cell>
          <table:table-cell table:style-name="Table8.A1" office:value-type="string">
            <text:p text:style-name="P9"><text:span text:style-name="T22"/></text:p>
          </table:table-cell>
          <table:table-cell table:style-name="Table8.A1" office:value-type="string">
            <text:p text:style-name="P9" loext:marker-style-name="T20"><text:span text:style-name="T21">89 - 111</text:span></text:p>
          </table:table-cell>
        </table:table-row>
      </table:table>
      <text:h text:style-name="P14" text:outline-level="2" loext:marker-style-name="T1"><text:span text:style-name="T24"/></text:h>
      <text:h text:style-name="P16" text:outline-level="2"><text:span text:style-name="T24">2.5</text:span><text:span text:style-name="T3"><text:tab/></text:span><text:span text:style-name="T24">QC XRS2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9" loext:marker-style-name="T20"><text:span text:style-name="T21">Sample</text:span></text:p>
          </table:table-cell>
          <table:table-cell table:style-name="Table9.A1" office:value-type="string">
            <text:p text:style-name="P9"><text:span text:style-name="T22"/></text:p>
          </table:table-cell>
          <table:table-cell table:style-name="Table9.A1" office:value-type="string">
            <text:p text:style-name="P9" loext:marker-style-name="T20"><text:span text:style-name="T21">Specification Range</text:span></text:p>
          </table:table-cell>
        </table:table-row>
        <table:table-row table:style-name="Table9.1">
          <table:table-cell table:style-name="Table9.A1" office:value-type="string">
            <text:p text:style-name="P9" loext:marker-style-name="T20"><text:span text:style-name="T21">Date</text:span></text:p>
          </table:table-cell>
          <table:table-cell table:style-name="Table9.A1" office:value-type="string">
            <text:p text:style-name="P9"><text:span text:style-name="T22"/></text:p>
          </table:table-cell>
          <table:table-cell table:style-name="Table9.A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9" loext:marker-style-name="T20"><text:span text:style-name="T21">Calibration</text:span></text:p>
          </table:table-cell>
          <table:table-cell table:style-name="Table9.A1" office:value-type="string">
            <text:p text:style-name="P9"><text:span text:style-name="T22"/></text:p>
          </table:table-cell>
          <table:table-cell table:style-name="Table9.A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9" loext:marker-style-name="T20"><text:span text:style-name="T21">Co (PPM)</text:span></text:p>
          </table:table-cell>
          <table:table-cell table:style-name="Table9.A1" office:value-type="string">
            <text:p text:style-name="P9"><text:span text:style-name="T22"/></text:p>
          </table:table-cell>
          <table:table-cell table:style-name="Table9.A1" office:value-type="string">
            <text:p text:style-name="P9" loext:marker-style-name="T20"><text:span text:style-name="T21">89 - 111</text:span></text:p>
          </table:table-cell>
        </table:table-row>
        <table:table-row table:style-name="Table9.1">
          <table:table-cell table:style-name="Table9.A1" office:value-type="string">
            <text:p text:style-name="P9" loext:marker-style-name="T20"><text:span text:style-name="T21">As (PPM)</text:span></text:p>
          </table:table-cell>
          <table:table-cell table:style-name="Table9.A1" office:value-type="string">
            <text:p text:style-name="P9"><text:span text:style-name="T22"/></text:p>
          </table:table-cell>
          <table:table-cell table:style-name="Table9.A1" office:value-type="string">
            <text:p text:style-name="P9" loext:marker-style-name="T20"><text:span text:style-name="T21">89 - 111</text:span></text:p>
          </table:table-cell>
        </table:table-row>
        <table:table-row table:style-name="Table9.1">
          <table:table-cell table:style-name="Table9.A1" office:value-type="string">
            <text:p text:style-name="P9" loext:marker-style-name="T20"><text:span text:style-name="T21">In (PPM)</text:span></text:p>
          </table:table-cell>
          <table:table-cell table:style-name="Table9.A1" office:value-type="string">
            <text:p text:style-name="P9"><text:span text:style-name="T22"/></text:p>
          </table:table-cell>
          <table:table-cell table:style-name="Table9.A1" office:value-type="string">
            <text:p text:style-name="P9" loext:marker-style-name="T20"><text:span text:style-name="T21">89 - 111</text:span></text:p>
          </table:table-cell>
        </table:table-row>
        <table:table-row table:style-name="Table9.1">
          <table:table-cell table:style-name="Table9.A1" office:value-type="string">
            <text:p text:style-name="P9" loext:marker-style-name="T20"><text:span text:style-name="T21">W (PPM)</text:span></text:p>
          </table:table-cell>
          <table:table-cell table:style-name="Table9.A1" office:value-type="string">
            <text:p text:style-name="P9"><text:span text:style-name="T22"/></text:p>
          </table:table-cell>
          <table:table-cell table:style-name="Table9.A1" office:value-type="string">
            <text:p text:style-name="P9" loext:marker-style-name="T20"><text:span text:style-name="T21">89 - 111</text:span></text:p>
          </table:table-cell>
        </table:table-row>
        <table:table-row table:style-name="Table9.1">
          <table:table-cell table:style-name="Table9.A1" office:value-type="string">
            <text:p text:style-name="P9" loext:marker-style-name="T20"><text:span text:style-name="T21">Tl (PPM)</text:span></text:p>
          </table:table-cell>
          <table:table-cell table:style-name="Table9.A1" office:value-type="string">
            <text:p text:style-name="P9"><text:span text:style-name="T22"/></text:p>
          </table:table-cell>
          <table:table-cell table:style-name="Table9.A1" office:value-type="string">
            <text:p text:style-name="P9" loext:marker-style-name="T20"><text:span text:style-name="T21">89 - 111</text:span></text:p>
          </table:table-cell>
        </table:table-row>
        <table:table-row table:style-name="Table9.1">
          <table:table-cell table:style-name="Table9.A1" office:value-type="string">
            <text:p text:style-name="P9" loext:marker-style-name="T20"><text:span text:style-name="T21">Bi (PPM)</text:span></text:p>
          </table:table-cell>
          <table:table-cell table:style-name="Table9.A1" office:value-type="string">
            <text:p text:style-name="P9"><text:span text:style-name="T22"/></text:p>
          </table:table-cell>
          <table:table-cell table:style-name="Table9.A1" office:value-type="string">
            <text:p text:style-name="P9" loext:marker-style-name="T20"><text:span text:style-name="T21">89 - 111</text:span></text:p>
          </table:table-cell>
        </table:table-row>
      </table:table>
      <text:p text:style-name="P17" loext:marker-style-name="T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Fett" svg:font-family="'Arial Fett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de" fo:country="DE" style:letter-kerning="fals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color="#000000" loext:opacity="100%" style:font-name="Arial" fo:font-family="Arial" style:font-family-generic="roman" style:font-pitch="variable"/>
    </style:style>
    <style:style style:name="List" style:family="paragraph" style:parent-style-name="Standard" style:class="list">
      <style:paragraph-properties fo:margin-left="0.499cm" fo:margin-top="0cm" fo:margin-bottom="0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353cm" fo:margin-bottom="0.212cm" style:contextual-spacing="false" fo:keep-with-next="always"/>
      <style:text-properties fo:color="#006cb0" loext:opacity="100%" style:font-name="Arial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.212cm" style:contextual-spacing="false" fo:keep-with-next="always"/>
      <style:text-properties fo:color="#006cb0" loext:opacity="100%" style:font-name="Arial Fett" fo:font-family="'Arial Fett'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cm" fo:margin-bottom="0.212cm" style:contextual-spacing="false" fo:keep-with-next="always"/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Organisationsz" style:family="paragraph" style:next-style-name="Footer">
      <style:paragraph-properties fo:margin-top="0.212cm" fo:margin-bottom="0cm" style:contextual-spacing="false" style:line-height-at-least="0.212cm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7pt" fo:language="de" fo:country="DE" style:letter-kerning="false" style:font-name-asian="Times New Roman1" style:font-family-asian="'Times New Roman'" style:font-family-generic-asian="system" style:font-pitch-asian="variable" style:font-size-asian="7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lain_20_Text1" style:display-name="Plain Text1" style:family="paragraph" style:parent-style-name="Standard">
      <style:text-properties style:font-name="Courier New" fo:font-family="'Courier New'" style:font-family-generic="roman" style:font-pitch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Map_20__28_WW_29_" style:display-name="Document Map (WW)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orphans="0" fo:widows="0"/>
      <style:text-properties fo:color="#000000" loext:opacity="100%"/>
    </style:style>
    <style:style style:name="b_5f_body" style:display-name="b_body" style:family="paragraph" style:parent-style-name="Standard" loext:linked-style-name="b_5f_body_20_Char">
      <style:paragraph-properties fo:margin-top="0.212cm" fo:margin-bottom="0.212cm" style:contextual-spacing="false" fo:line-height="108%"/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pn_5f_procedure_5f_next" style:display-name="pn_procedure_next" style:family="paragraph" style:parent-style-name="Standard" loext:linked-style-name="pn_5f_procedure_5f_next_20_Char" style:list-style-name="WWNum1" style:list-level="1">
      <style:paragraph-properties fo:margin-top="0.106cm" fo:margin-bottom="0.106cm" style:contextual-spacing="false" fo:line-height="108%"/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b" style:family="paragraph" style:parent-style-name="Text_20_body">
      <style:text-properties fo:language="en" fo:country="GB"/>
    </style:style>
    <style:style style:name="lb_5f_liste_5f_bullet" style:display-name="lb_liste_bullet" style:family="paragraph" style:parent-style-name="b_5f_body" style:list-style-name="WWNum2" style:list-level="1"/>
    <style:style style:name="Revision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de" fo:country="DE" style:letter-kerning="fals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Simple_20_1" style:display-name="Table Simple 1" style:family="paragraph" style:parent-style-name="Normal_20_Table_20__28_WW_29_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b_5f_body_20_Char" style:display-name="b_body Char" style:family="text" style:parent-style-name="Default_20_Paragraph_20_Font_20__28_WW_29_" loext:linked-style-name="b_5f_body"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pn_5f_procedure_5f_next_20_Char" style:display-name="pn_procedure_next Char" style:family="text" style:parent-style-name="Default_20_Paragraph_20_Font_20__28_WW_29_" loext:linked-style-name="pn_5f_procedure_5f_next"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6ab2" loext:opacity="100%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2" style:display-name="ListLabel 2" style:family="text">
      <style:text-properties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color="#0070c0" loext:opacity="100%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006ab2" loext:opacity="100%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20" style:display-name="ListLabel 20" style:family="text">
      <style:text-properties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variant="normal" fo:text-transform="none" fo:color="#006ab2" loext:opacity="100%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38" style:display-name="ListLabel 38" style:family="text">
      <style:text-properties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Larissa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.423cm" fo:margin-bottom="0cm" style:contextual-spacing="false" fo:padding-left="0cm" fo:padding-right="0cm" fo:padding-top="0cm" fo:padding-bottom="0.035cm" fo:border-left="none" fo:border-right="none" fo:border-top="none" fo:border-bottom="3pt solid #0071bc"/>
    </style:style>
    <style:style style:name="MP2" style:family="paragraph" style:parent-style-name="Header">
      <style:paragraph-properties fo:margin-top="0.423cm" fo:margin-bottom="0cm" style:contextual-spacing="false" fo:padding-left="0cm" fo:padding-right="0cm" fo:padding-top="0cm" fo:padding-bottom="0.035cm" fo:border-left="none" fo:border-right="none" fo:border-top="none" fo:border-bottom="3pt solid #0071bc"/>
      <style:text-properties style:text-position="super 58%"/>
    </style:style>
    <style:style style:name="MP3" style:family="paragraph" style:parent-style-name="Footer">
      <style:paragraph-properties fo:margin-right="-0.002cm" fo:padding="0cm" fo:border-left="none" fo:border-right="none" fo:border-top="3pt solid #0071bc" fo:border-bottom="none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>
      <loext:graphic-properties draw:fill="none"/>
      <style:paragraph-properties fo:text-align="left"/>
      <style:text-properties fo:color="#000000" loext:opacity="100%" fo:font-size="18pt"/>
    </style:style>
    <style:style style:name="MT1" style:family="text">
      <style:text-properties style:font-name="Arial" fo:font-size="15pt" fo:language="en" fo:country="GB" style:font-size-asian="15pt"/>
    </style:style>
    <style:style style:name="MT2" style:family="text">
      <style:text-properties style:font-name="Arial" fo:font-size="15pt" fo:language="en" fo:country="GB" officeooo:rsid="002a3ea1" style:font-size-asian="15pt"/>
    </style:style>
    <style:style style:name="MT3" style:family="text">
      <style:text-properties style:font-name="Arial" fo:font-size="15pt" fo:language="en" fo:country="GB" officeooo:rsid="004360d3" style:font-size-asian="15pt"/>
    </style:style>
    <style:style style:name="MT4" style:family="text">
      <style:text-properties style:font-name="Arial" fo:language="en" fo:country="GB" fo:font-weight="bold" style:font-weight-asian="bold" style:font-name-complex="Arial2"/>
    </style:style>
    <style:style style:name="MT5" style:family="text">
      <style:text-properties fo:color="#000000" loext:opacity="100%" style:font-name="Calibri" fo:font-size="8pt" style:font-size-asian="8pt" style:font-family-complex="Calibri" style:font-family-generic-complex="system" style:font-pitch-complex="variable"/>
    </style:style>
    <style:style style:name="MT6" style:family="text">
      <style:text-properties style:font-name="Arial" fo:language="en" fo:country="GB" fo:font-weight="bold" style:font-weight-asian="bold"/>
    </style:style>
    <style:style style:name="MT7" style:family="text">
      <style:text-properties style:font-name="Arial" fo:font-weight="bold" style:font-weight-asian="bold" style:font-name-complex="Arial2"/>
    </style:style>
    <style:style style:name="MT8" style:family="text">
      <style:text-properties style:font-name="Arial" fo:language="en" fo:country="US" fo:font-weight="bold" style:font-weight-asian="bold" style:font-name-complex="Arial2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.018cm" draw:fill="none" loext:fill-use-slide-background="false" draw:textarea-vertical-align="bottom" draw:auto-grow-height="false" fo:min-height="0.76cm" fo:min-width="20.496cm" fo:padding-top="0cm" fo:padding-bottom="0cm" fo:padding-left="0.254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0.73cm" fo:margin-left="2.501cm" fo:margin-right="2.501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0.52cm" fo:margin-left="0cm" fo:margin-right="0cm" fo:margin-top="0.4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Bild 1" text:anchor-type="char" svg:x="12.882cm" svg:y="0.007cm" svg:width="3.201cm" svg:height="1.693cm" draw:z-index="8"><draw:image xlink:href="Pictures/10000000000002B80000017348A2EA88.jpg" xlink:type="simple" xlink:show="embed" xlink:actuate="onLoad" draw:mime-type="image/jpeg"/><svg:desc>logo_rgb_300dpi</svg:desc><draw:contour-polygon svg:width="5.819cm" svg:height="3.051cm" svg:viewBox="0 0 5819 3051" draw:points="20,0 20,3051 5839,3051 5839,0" draw:recreate-on-edit="false"/></draw:frame><text:span text:style-name="MT2">PETRO-QUANT </text:span><text:span text:style-name="MT3">4.1</text:span><text:span text:style-name="MT1"> – Acceptance Test</text:span></text:p>
        <text:p text:style-name="MP2"/>
      </style:header>
      <style:footer>
        <text:p text:style-name="MP3" loext:marker-style-name="MT4"><draw:custom-shape text:anchor-type="char" draw:z-index="2" draw:name="MSIPCMdf6540f7a3b1048952b5c2cb" draw:style-name="Mgr1" draw:text-style-name="MP5" svg:width="21.003cm" svg:height="0.759cm" svg:x="0cm" svg:y="28.414cm"><svg:desc>{"HashCode":-527952489,"Height":842.0,"Width":595.0,"Placement":"Footer","Index":"Primary","Section":1,"Top":0.0,"Left":0.0}</svg:desc><text:p text:style-name="MP4" loext:marker-style-name="MT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6">File in Instrument Supplement Folder and forward to local Service Support <text:tab/>Page </text:span><text:span text:style-name="page_20_number"><text:span text:style-name="MT7"><text:page-number text:select-page="current">3</text:page-number></text:span></text:span><text:span text:style-name="page_20_number"><text:span text:style-name="MT8"><text:s/>of </text:span></text:span><text:span text:style-name="page_20_number"><text:span text:style-name="MT7"><text:page-count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1:24:00</meta:creation-date>
    <meta:initial-creator>Uwe Metka</meta:initial-creator>
    <dc:language>en-US</dc:language>
    <meta:print-date>2026-02-10T15:45:00</meta:print-date>
    <dc:date>2026-06-09T12:18:07.578093200</dc:date>
    <meta:editing-cycles>78</meta:editing-cycles>
    <dc:title>A55X-X26-R01 Acceptance Test</dc:title>
    <meta:editing-duration>P6DT17H41M7S</meta:editing-duration>
    <meta:generator>LibreOffice/26.2.3.2$Windows_X86_64 LibreOffice_project/70e089b17412e4cb7773e41413306b17a2328c34</meta:generator>
    <meta:document-statistic meta:table-count="4" meta:image-count="1" meta:object-count="0" meta:page-count="3" meta:paragraph-count="160" meta:word-count="662" meta:character-count="3193" meta:non-whitespace-character-count="2689"/>
    <meta:user-defined meta:name="AppVersion">15.0000</meta:user-defined>
    <meta:user-defined meta:name="Company">Siemens AG</meta:user-defined>
    <meta:user-defined meta:name="MSIP_Label_e340eb20-1c5f-4409-b1a4-85adc943d5d7_ActionId">ed9428ed-c856-4eac-b2d0-20bae494b2f9</meta:user-defined>
    <meta:user-defined meta:name="MSIP_Label_e340eb20-1c5f-4409-b1a4-85adc943d5d7_ContentBits">2</meta:user-defined>
    <meta:user-defined meta:name="MSIP_Label_e340eb20-1c5f-4409-b1a4-85adc943d5d7_Enabled" meta:value-type="string">true</meta:user-defined>
    <meta:user-defined meta:name="MSIP_Label_e340eb20-1c5f-4409-b1a4-85adc943d5d7_Method" meta:value-type="string">Standard</meta:user-defined>
    <meta:user-defined meta:name="MSIP_Label_e340eb20-1c5f-4409-b1a4-85adc943d5d7_Name" meta:value-type="string">Confidential</meta:user-defined>
    <meta:user-defined meta:name="MSIP_Label_e340eb20-1c5f-4409-b1a4-85adc943d5d7_SetDate" meta:value-type="string">2025-08-14T13:25:26Z</meta:user-defined>
    <meta:user-defined meta:name="MSIP_Label_e340eb20-1c5f-4409-b1a4-85adc943d5d7_SiteId" meta:value-type="string">375ce1b8-8db1-479b-a12c-06fa9d2a2eaf</meta:user-defined>
    <meta:template xlink:type="simple" xlink:actuate="onRequest" xlink:title="Normal.dotm" xlink:href=""/>
  </office:meta>
</office:document-meta>
</file>