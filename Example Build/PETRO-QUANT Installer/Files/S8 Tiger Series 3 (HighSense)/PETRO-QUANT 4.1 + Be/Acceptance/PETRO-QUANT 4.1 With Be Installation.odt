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B80000017348A2EA88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Fett" svg:font-family="'Arial Fett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222cm" fo:margin-left="-0.441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0.71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097cm" fo:margin-left="-0.182cm" fo:margin-top="0cm" fo:margin-bottom="0cm" table:align="left" style:writing-mode="page"/>
    </style:style>
    <style:style style:name="Table3.A" style:family="table-column">
      <style:table-column-properties style:column-width="2.84cm"/>
    </style:style>
    <style:style style:name="Table3.B" style:family="table-column">
      <style:table-column-properties style:column-width="4.471cm"/>
    </style:style>
    <style:style style:name="Table3.C" style:family="table-column">
      <style:table-column-properties style:column-width="4.288cm"/>
    </style:style>
    <style:style style:name="Table3.D" style:family="table-column">
      <style:table-column-properties style:column-width="4.49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6.15cm" fo:margin-left="-0.182cm" fo:margin-top="0cm" fo:margin-bottom="0cm" table:align="left" style:writing-mode="page"/>
    </style:style>
    <style:style style:name="Table2.A" style:family="table-column">
      <style:table-column-properties style:column-width="2.789cm"/>
    </style:style>
    <style:style style:name="Table2.B" style:family="table-column">
      <style:table-column-properties style:column-width="4.577cm"/>
    </style:style>
    <style:style style:name="Table2.C" style:family="table-column">
      <style:table-column-properties style:column-width="4.339cm"/>
    </style:style>
    <style:style style:name="Table2.D" style:family="table-column">
      <style:table-column-properties style:column-width="4.44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" style:family="table">
      <style:table-properties style:width="16.097cm" fo:margin-left="-0.182cm" fo:margin-top="0cm" fo:margin-bottom="0cm" table:align="left" style:writing-mode="page"/>
    </style:style>
    <style:style style:name="Table5.A" style:family="table-column">
      <style:table-column-properties style:column-width="2.946cm"/>
    </style:style>
    <style:style style:name="Table5.B" style:family="table-column">
      <style:table-column-properties style:column-width="4.579cm"/>
    </style:style>
    <style:style style:name="Table5.C" style:family="table-column">
      <style:table-column-properties style:column-width="4.366cm"/>
    </style:style>
    <style:style style:name="Table5.D" style:family="table-column">
      <style:table-column-properties style:column-width="4.20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6.177cm" fo:margin-left="-0.182cm" fo:margin-top="0cm" fo:margin-bottom="0cm" table:align="left" style:writing-mode="page"/>
    </style:style>
    <style:style style:name="Table4.A" style:family="table-column">
      <style:table-column-properties style:column-width="2.868cm"/>
    </style:style>
    <style:style style:name="Table4.B" style:family="table-column">
      <style:table-column-properties style:column-width="4.604cm"/>
    </style:style>
    <style:style style:name="Table4.C" style:family="table-column">
      <style:table-column-properties style:column-width="4.417cm"/>
    </style:style>
    <style:style style:name="Table4.D" style:family="table-column">
      <style:table-column-properties style:column-width="4.28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margin-top="0cm" fo:margin-bottom="0.85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left" style:justify-single-word="false" fo:orphans="2" fo:widows="2"/>
      <style:text-properties style:font-name="Arial1" fo:font-size="11pt" fo:font-weight="bold" officeooo:paragraph-rsid="002453bf" style:letter-kerning="false" style:font-name-asian="Times New Roman1" style:font-size-asian="11pt" style:language-asian="de" style:country-asian="DE" style:font-weight-asian="bold" style:font-name-complex="Times New Roman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left" style:justify-single-word="false" fo:orphans="2" fo:widows="2"/>
      <style:text-properties style:font-name="Arial" fo:language="en" fo:country="GB"/>
    </style:style>
    <style:style style:name="P4" style:family="paragraph" style:parent-style-name="Standard">
      <style:paragraph-properties fo:margin-top="0cm" fo:margin-bottom="0cm" style:contextual-spacing="false" fo:text-align="left" style:justify-single-word="false" fo:orphans="2" fo:widows="2"/>
      <style:text-properties style:font-name="Arial" fo:font-size="11pt" fo:language="en" fo:country="GB" fo:font-weight="bold" officeooo:paragraph-rsid="002453bf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language="en" fo:country="GB" officeooo:rsid="002a3ea1"/>
    </style:style>
    <style:style style:name="P6" style:family="paragraph" style:parent-style-name="Standard">
      <style:text-properties style:font-name="Arial" fo:language="en" fo:country="GB" officeooo:rsid="002a3ea1" officeooo:paragraph-rsid="002a3ea1"/>
    </style:style>
    <style:style style:name="P7" style:family="paragraph" style:parent-style-name="Heading_20_2">
      <style:text-properties style:font-name="Arial1" officeooo:paragraph-rsid="002da62f"/>
    </style:style>
    <style:style style:name="P8" style:family="paragraph" style:parent-style-name="Standard">
      <style:paragraph-properties fo:text-align="center" style:justify-single-word="false" fo:orphans="2" fo:widows="2">
        <style:tab-stops/>
      </style:paragraph-properties>
    </style:style>
    <style:style style:name="P9" style:family="paragraph" style:parent-style-name="Standard">
      <style:paragraph-properties fo:text-align="left" style:justify-single-word="false"/>
    </style:style>
    <style:style style:name="P10" style:family="paragraph" style:parent-style-name="Standard">
      <style:paragraph-properties fo:text-align="left" style:justify-single-word="false"/>
      <style:text-properties fo:language="en" fo:country="GB"/>
    </style:style>
    <style:style style:name="P11" style:family="paragraph" style:parent-style-name="Heading_20_2">
      <style:text-properties style:font-name="Arial1"/>
    </style:style>
    <style:style style:name="P12" style:family="paragraph" style:parent-style-name="Standard">
      <style:paragraph-properties fo:text-align="left" style:justify-single-word="false"/>
      <style:text-properties fo:language="en" fo:country="GB" style:font-name-asian="SimSun"/>
    </style:style>
    <style:style style:name="P13" style:family="paragraph" style:parent-style-name="Standard">
      <style:paragraph-properties fo:text-align="center" style:justify-single-word="false" fo:orphans="2" fo:widows="2">
        <style:tab-stops/>
      </style:paragraph-properties>
      <style:text-properties style:use-window-font-color="true" loext:opacity="0%" style:font-name="Times New Roman" fo:language="de" fo:country="DE" style:language-asian="de" style:country-asian="DE"/>
    </style:style>
    <style:style style:name="P14" style:family="paragraph" style:parent-style-name="Standard">
      <style:paragraph-properties fo:text-align="left" style:justify-single-word="false"/>
      <style:text-properties style:font-name="Arial" fo:language="en" fo:country="GB"/>
    </style:style>
    <style:style style:name="P15" style:family="paragraph" style:parent-style-name="b_5f_body">
      <style:text-properties fo:font-size="10pt" officeooo:paragraph-rsid="003801eb" style:font-size-asian="10pt" style:font-size-complex="10pt"/>
    </style:style>
    <style:style style:name="P16" style:family="paragraph" style:parent-style-name="b_5f_body">
      <style:paragraph-properties fo:margin-top="0.212cm" fo:margin-bottom="0cm" style:contextual-spacing="false" fo:text-align="left" style:justify-single-word="false" fo:orphans="2" fo:widows="2"/>
      <style:text-properties fo:font-size="10pt" officeooo:paragraph-rsid="0039f364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text-align="left" style:justify-single-word="false" fo:orphans="2" fo:widows="2"/>
      <style:text-properties officeooo:paragraph-rsid="0039f364"/>
    </style:style>
    <style:style style:name="P18" style:family="paragraph" style:parent-style-name="Footer">
      <style:paragraph-properties fo:margin-right="-0.503cm" fo:margin-top="0cm" fo:margin-bottom="0cm" style:contextual-spacing="false" fo:text-align="left" style:justify-single-word="false" fo:orphans="2" fo:widows="2"/>
      <style:text-properties style:font-name="Arial" fo:language="en" fo:country="US" officeooo:paragraph-rsid="0039f364"/>
    </style:style>
    <style:style style:name="P19" style:family="paragraph" style:parent-style-name="Frame_20_contents">
      <style:paragraph-properties fo:text-align="center" style:justify-single-word="false"/>
    </style:style>
    <style:style style:name="P20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a3ea1"/>
    </style:style>
    <style:style style:name="T3" style:family="text">
      <style:text-properties style:font-name="Arial" fo:language="en" fo:country="GB"/>
    </style:style>
    <style:style style:name="T4" style:family="text">
      <style:text-properties officeooo:rsid="00351fa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4e722"/>
    </style:style>
    <style:style style:name="T7" style:family="text">
      <style:text-properties fo:language="en" fo:country="US" officeooo:rsid="002a3ea1"/>
    </style:style>
    <style:style style:name="T8" style:family="text">
      <style:text-properties fo:language="en" fo:country="US" officeooo:rsid="002da62f"/>
    </style:style>
    <style:style style:name="T9" style:family="text">
      <style:text-properties fo:language="de" fo:country="DE"/>
    </style:style>
    <style:style style:name="T10" style:family="text">
      <style:text-properties style:use-window-font-color="true" loext:opacity="0%" fo:language="de" fo:country="DE" style:language-asian="de" style:country-asian="DE"/>
    </style:style>
    <style:style style:name="T11" style:family="text">
      <style:text-properties style:use-window-font-color="true" loext:opacity="0%"/>
    </style:style>
    <style:style style:name="T12" style:family="text">
      <style:text-properties fo:language="en" fo:country="GB" officeooo:rsid="002ccab1"/>
    </style:style>
    <style:style style:name="T13" style:family="text">
      <style:text-properties fo:language="en" fo:country="US" officeooo:rsid="0009a8ff"/>
    </style:style>
    <style:style style:name="T14" style:family="text">
      <style:text-properties fo:language="en" fo:country="GB" officeooo:rsid="002da62f"/>
    </style:style>
    <style:style style:name="T15" style:family="text">
      <style:text-properties fo:language="en" fo:country="US" style:letter-kerning="false" style:language-asian="de" style:country-asian="DE" style:language-complex="ar" style:country-complex="SA"/>
    </style:style>
    <style:style style:name="T16" style:family="text">
      <style:text-properties fo:language="en" fo:country="US" officeooo:rsid="0039f364" style:letter-kerning="false" style:language-asian="de" style:country-asian="DE" style:language-complex="ar" style:country-complex="SA"/>
    </style:style>
    <style:style style:name="T17" style:family="text">
      <style:text-properties style:font-name="Arial" fo:font-size="7pt" fo:language="en" fo:country="US" style:font-size-asian="7pt" style:font-name-complex="Arial2" style:font-size-complex="7pt"/>
    </style:style>
    <style:style style:name="T18" style:family="text">
      <style:text-properties style:font-name="Arial" fo:font-size="7pt" fo:language="en" fo:country="US" style:letter-kerning="false" style:font-name-asian="Times New Roman1" style:font-size-asian="7pt" style:language-asian="de" style:country-asian="DE" style:font-name-complex="Arial2" style:font-size-complex="7pt" style:language-complex="ar" style:country-complex="SA"/>
    </style:style>
    <style:style style:name="T19" style:family="text">
      <style:text-properties style:font-name="Arial" fo:language="en" fo:country="US"/>
    </style:style>
    <style:style style:name="T20" style:family="text">
      <style:text-properties fo:color="#000000" loext:opacity="100%" style:font-name="Calibri" fo:font-size="8pt" style:font-size-asian="8pt" style:font-family-complex="Calibri" style:font-family-generic-complex="system" style:font-pitch-complex="variabl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"/>
      </text:sequence-decls>
      <text:user-field-decls>
        <text:user-field-decl office:value-type="string" office:string-value="[PAR:Sample ID:{?*}]" text:name="PAR:Sample ID:{?*}"/>
        <text:user-field-decl office:value-type="string" office:string-value="[PAR:End Time:{?*}]" text:name="PAR:End Time:{?*}"/>
        <text:user-field-decl office:value-type="string" office:string-value="[PAR:Application:{?*}]" text:name="PAR:Application:{?*}"/>
        <text:user-field-decl office:value-type="string" office:string-value="[PAR:Na2O (%):{?*}]" text:name="PAR:Na2O (%):{?*}"/>
        <text:user-field-decl office:value-type="string" office:string-value="[PAR:Al2O3 (%):{?*}]" text:name="PAR:Al2O3 (%):{?*}"/>
        <text:user-field-decl office:value-type="string" office:string-value="[PAR:SiO2 (%):{?*}]" text:name="PAR:SiO2 (%):{?*}"/>
        <text:user-field-decl office:value-type="string" office:string-value="[PAR:CaO (%):{?*}]" text:name="PAR:CaO (%):{?*}"/>
        <text:user-field-decl office:value-type="string" office:string-value="[PAR:MnO (%):{?*}]" text:name="PAR:MnO (%):{?*}"/>
        <text:user-field-decl office:value-type="string" office:string-value="[PAR:Sb2O3 (%):{?*}]" text:name="PAR:Sb2O3 (%):{?*}"/>
        <text:user-field-decl office:value-type="string" office:string-value="[PAR:Sample ID:{?*2}]" text:name="PAR:Sample ID:{?*2}"/>
        <text:user-field-decl office:value-type="string" office:string-value="[PAR:End Time:{?*2}]" text:name="PAR:End Time:{?*2}"/>
        <text:user-field-decl office:value-type="string" office:string-value="[PAR:Application:{?*2}]" text:name="PAR:Application:{?*2}"/>
        <text:user-field-decl office:value-type="string" office:string-value="[PAR:Na (PPM):{?*2}]" text:name="PAR:Na (PPM):{?*2}"/>
        <text:user-field-decl office:value-type="string" office:string-value="[PAR:Na (PPM):{?*}]" text:name="PAR:Na (PPM):{?*}"/>
        <text:user-field-decl office:value-type="string" office:string-value="[PAR:Mg (PPM):{?*2}]" text:name="PAR:Mg (PPM):{?*2}"/>
        <text:user-field-decl office:value-type="string" office:string-value="[PAR:Mg (PPM):{?*}]" text:name="PAR:Mg (PPM):{?*}"/>
        <text:user-field-decl office:value-type="string" office:string-value="[PAR:Al (PPM):{?*2}]" text:name="PAR:Al (PPM):{?*2}"/>
        <text:user-field-decl office:value-type="string" office:string-value="[PAR:Al (PPM):{?*}]" text:name="PAR:Al (PPM):{?*}"/>
        <text:user-field-decl office:value-type="string" office:string-value="[PAR:Si (PPM):{?*2}]" text:name="PAR:Si (PPM):{?*2}"/>
        <text:user-field-decl office:value-type="string" office:string-value="[PAR:Si (PPM):{?*}]" text:name="PAR:Si (PPM):{?*}"/>
        <text:user-field-decl office:value-type="string" office:string-value="[PAR:P (PPM):{?*2}]" text:name="PAR:P (PPM):{?*2}"/>
        <text:user-field-decl office:value-type="string" office:string-value="[PAR:P (PPM):{?*}]" text:name="PAR:P (PPM):{?*}"/>
        <text:user-field-decl office:value-type="string" office:string-value="[PAR:S (%):{?*2}]" text:name="PAR:S (%):{?*2}"/>
        <text:user-field-decl office:value-type="string" office:string-value="[PAR:S (%):{?*}]" text:name="PAR:S (%):{?*}"/>
        <text:user-field-decl office:value-type="string" office:string-value="[PAR:Cl (PPM):{?*2}]" text:name="PAR:Cl (PPM):{?*2}"/>
        <text:user-field-decl office:value-type="string" office:string-value="[PAR:Cl (PPM):{?*}]" text:name="PAR:Cl (PPM):{?*}"/>
        <text:user-field-decl office:value-type="string" office:string-value="[PAR:K (PPM):{?*2}]" text:name="PAR:K (PPM):{?*2}"/>
        <text:user-field-decl office:value-type="string" office:string-value="[PAR:K (PPM):{?*}]" text:name="PAR:K (PPM):{?*}"/>
        <text:user-field-decl office:value-type="string" office:string-value="[PAR:Ca (PPM):{?*2}]" text:name="PAR:Ca (PPM):{?*2}"/>
        <text:user-field-decl office:value-type="string" office:string-value="[PAR:Ca (PPM):{?*}]" text:name="PAR:Ca (PPM):{?*}"/>
        <text:user-field-decl office:value-type="string" office:string-value="[PAR:Ti (PPM):{?*2}]" text:name="PAR:Ti (PPM):{?*2}"/>
        <text:user-field-decl office:value-type="string" office:string-value="[PAR:Ti (PPM):{?*}]" text:name="PAR:Ti (PPM):{?*}"/>
        <text:user-field-decl office:value-type="string" office:string-value="[PAR:V (PPM):{?*2}]" text:name="PAR:V (PPM):{?*2}"/>
        <text:user-field-decl office:value-type="string" office:string-value="[PAR:V (PPM):{?*}]" text:name="PAR:V (PPM):{?*}"/>
        <text:user-field-decl office:value-type="string" office:string-value="[PAR:Cr (PPM):{?*2}]" text:name="PAR:Cr (PPM):{?*2}"/>
        <text:user-field-decl office:value-type="string" office:string-value="[PAR:Cr (PPM):{?*}]" text:name="PAR:Cr (PPM):{?*}"/>
        <text:user-field-decl office:value-type="string" office:string-value="[PAR:Mn (PPM):{?*2}]" text:name="PAR:Mn (PPM):{?*2}"/>
        <text:user-field-decl office:value-type="string" office:string-value="[PAR:Mn (PPM):{?*}]" text:name="PAR:Mn (PPM):{?*}"/>
        <text:user-field-decl office:value-type="string" office:string-value="[PAR:Fe (PPM):{?*2}]" text:name="PAR:Fe (PPM):{?*2}"/>
        <text:user-field-decl office:value-type="string" office:string-value="[PAR:Fe (PPM):{?*}]" text:name="PAR:Fe (PPM):{?*}"/>
        <text:user-field-decl office:value-type="string" office:string-value="[PAR:Co (PPM):{?*2}]" text:name="PAR:Co (PPM):{?*2}"/>
        <text:user-field-decl office:value-type="string" office:string-value="[PAR:Co (PPM):{?*}]" text:name="PAR:Co (PPM):{?*}"/>
        <text:user-field-decl office:value-type="string" office:string-value="[PAR:Ni (PPM):{?*2}]" text:name="PAR:Ni (PPM):{?*2}"/>
        <text:user-field-decl office:value-type="string" office:string-value="[PAR:Ni (PPM):{?*}]" text:name="PAR:Ni (PPM):{?*}"/>
        <text:user-field-decl office:value-type="string" office:string-value="[PAR:Cu (PPM):{?*2}]" text:name="PAR:Cu (PPM):{?*2}"/>
        <text:user-field-decl office:value-type="string" office:string-value="[PAR:Cu (PPM):{?*}]" text:name="PAR:Cu (PPM):{?*}"/>
        <text:user-field-decl office:value-type="string" office:string-value="[PAR:Zn (PPM):{?*2}]" text:name="PAR:Zn (PPM):{?*2}"/>
        <text:user-field-decl office:value-type="string" office:string-value="[PAR:Zn (PPM):{?*}]" text:name="PAR:Zn (PPM):{?*}"/>
        <text:user-field-decl office:value-type="string" office:string-value="[PAR:As (PPM):{?*2}]" text:name="PAR:As (PPM):{?*2}"/>
        <text:user-field-decl office:value-type="string" office:string-value="[PAR:As (PPM):{?*}]" text:name="PAR:As (PPM):{?*}"/>
        <text:user-field-decl office:value-type="string" office:string-value="[PAR:Br (PPM):{?*2}]" text:name="PAR:Br (PPM):{?*2}"/>
        <text:user-field-decl office:value-type="string" office:string-value="[PAR:Br (PPM):{?*}]" text:name="PAR:Br (PPM):{?*}"/>
        <text:user-field-decl office:value-type="string" office:string-value="[PAR:Zr (PPM):{?*2}]" text:name="PAR:Zr (PPM):{?*2}"/>
        <text:user-field-decl office:value-type="string" office:string-value="[PAR:Zr (PPM):{?*}]" text:name="PAR:Zr (PPM):{?*}"/>
        <text:user-field-decl office:value-type="string" office:string-value="[PAR:Mo (PPM):{?*2}]" text:name="PAR:Mo (PPM):{?*2}"/>
        <text:user-field-decl office:value-type="string" office:string-value="[PAR:Mo (PPM):{?*}]" text:name="PAR:Mo (PPM):{?*}"/>
        <text:user-field-decl office:value-type="string" office:string-value="[PAR:Ag (PPM):{?*2}]" text:name="PAR:Ag (PPM):{?*2}"/>
        <text:user-field-decl office:value-type="string" office:string-value="[PAR:Ag (PPM):{?*}]" text:name="PAR:Ag (PPM):{?*}"/>
        <text:user-field-decl office:value-type="string" office:string-value="[PAR:Cd (PPM):{?*2}]" text:name="PAR:Cd (PPM):{?*2}"/>
        <text:user-field-decl office:value-type="string" office:string-value="[PAR:Cd (PPM):{?*}]" text:name="PAR:Cd (PPM):{?*}"/>
        <text:user-field-decl office:value-type="string" office:string-value="[PAR:In (PPM):{?*2}]" text:name="PAR:In (PPM):{?*2}"/>
        <text:user-field-decl office:value-type="string" office:string-value="[PAR:In (PPM):{?*}]" text:name="PAR:In (PPM):{?*}"/>
        <text:user-field-decl office:value-type="string" office:string-value="[PAR:Sn (PPM):{?*2}]" text:name="PAR:Sn (PPM):{?*2}"/>
        <text:user-field-decl office:value-type="string" office:string-value="[PAR:Sn (PPM):{?*}]" text:name="PAR:Sn (PPM):{?*}"/>
        <text:user-field-decl office:value-type="string" office:string-value="[PAR:Sb (PPM):{?*2}]" text:name="PAR:Sb (PPM):{?*2}"/>
        <text:user-field-decl office:value-type="string" office:string-value="[PAR:Sb (PPM):{?*}]" text:name="PAR:Sb (PPM):{?*}"/>
        <text:user-field-decl office:value-type="string" office:string-value="[PAR:Ba (PPM):{?*2}]" text:name="PAR:Ba (PPM):{?*2}"/>
        <text:user-field-decl office:value-type="string" office:string-value="[PAR:Ba (PPM):{?*}]" text:name="PAR:Ba (PPM):{?*}"/>
        <text:user-field-decl office:value-type="string" office:string-value="[PAR:W (PPM):{?*2}]" text:name="PAR:W (PPM):{?*2}"/>
        <text:user-field-decl office:value-type="string" office:string-value="[PAR:W (PPM):{?*}]" text:name="PAR:W (PPM):{?*}"/>
        <text:user-field-decl office:value-type="string" office:string-value="[PAR:Tl (PPM):{?*2}]" text:name="PAR:Tl (PPM):{?*2}"/>
        <text:user-field-decl office:value-type="string" office:string-value="[PAR:Tl (PPM):{?*}]" text:name="PAR:Tl (PPM):{?*}"/>
        <text:user-field-decl office:value-type="string" office:string-value="[PAR:Pb (PPM):{?*2}]" text:name="PAR:Pb (PPM):{?*2}"/>
        <text:user-field-decl office:value-type="string" office:string-value="[PAR:Pb (PPM):{?*}]" text:name="PAR:Pb (PPM):{?*}"/>
        <text:user-field-decl office:value-type="string" office:string-value="[PAR:Bi (PPM):{?*2}]" text:name="PAR:Bi (PPM):{?*2}"/>
        <text:user-field-decl office:value-type="string" office:string-value="[PAR:Bi (PPM):{?*}]" text:name="PAR:Bi (PPM):{?*}"/>
      </text:user-field-decls>
      <text:h text:style-name="P1" text:outline-level="1" loext:marker-style-name="T1"><text:span text:style-name="T2">PETRO-QUANT 4.1 (Be)</text:span><text:span text:style-name="T1"> - Analytical Acceptance Test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ustomer Name:</text:p>
          </table:table-cell>
          <table:table-cell table:style-name="Table1.A1" office:value-type="string">
            <text:p text:style-name="P3" loext:marker-style-name="T3"/>
          </table:table-cell>
        </table:table-row>
        <table:table-row table:style-name="Table1.1">
          <table:table-cell table:style-name="Table1.A1" office:value-type="string">
            <text:p text:style-name="P4"><text:span text:style-name="T4">Instrument Serial Number</text:span>:</text:p>
          </table:table-cell>
          <table:table-cell table:style-name="Table1.A1" office:value-type="string">
            <text:p text:style-name="P3" loext:marker-style-name="T3"/>
          </table:table-cell>
        </table:table-row>
      </table:table>
      <text:p text:style-name="P5" loext:marker-style-name="T3"/>
      <text:p text:style-name="P6" loext:marker-style-name="T3">For elements where analytical limits deviate for the SampleCare version with Be filter, additional specification values are given. If no additional values are given in brackets, specifications for PETRO-QUANT and PETRO-QUANT Be are identical.</text:p>
      <text:h text:style-name="Heading_20_1" text:outline-level="1" loext:marker-style-name="T5"><text:span text:style-name="T6">1</text:span><text:span text:style-name="T5"><text:tab/></text:span><text:span text:style-name="T7">Factory Installation</text:span></text:h>
      <text:h text:style-name="P7" text:outline-level="2"><text:span text:style-name="T8">1.1</text:span><text:span text:style-name="T5"><text:tab/></text:span><text:span text:style-name="T2">QC Paraffin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 loext:marker-style-name="T9"><text:span text:style-name="T10">Sample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Specification Range (Be)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Date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Calibration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Na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16 (20)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Mg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11 (16)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Al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6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Si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6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P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 (6)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S (%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0.0004 (0.0006)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Cl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6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K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Ca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Ti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V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Cr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Mn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Fe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Co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Ni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Cu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Zn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As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6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Br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Zr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Mo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Ag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11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Cd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11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In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6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Sn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6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Sb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6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Ba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6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W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Tl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Pb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8" loext:marker-style-name="T9"><text:span text:style-name="T10">Bi (PPM)</text:span><text:span text:style-name="T10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><text:span text:style-name="T11"/></text:p>
          </table:table-cell>
          <table:table-cell table:style-name="Table3.A1" office:value-type="string">
            <text:p text:style-name="P8" loext:marker-style-name="T9"><text:span text:style-name="T10">&lt; 4</text:span><text:span text:style-name="T10"/></text:p>
          </table:table-cell>
        </table:table-row>
      </table:table>
      <text:p text:style-name="P9"/>
      <text:p text:style-name="P10"/>
      <text:p text:style-name="P10"/>
      <text:p text:style-name="P10"/>
      <text:p text:style-name="P10"/>
      <text:h text:style-name="P11" text:outline-level="2"><text:soft-page-break/><text:span text:style-name="T6">1.2</text:span><text:span text:style-name="T5"><text:tab/></text:span><text:span text:style-name="T2">QC Conostan S21+K+Sb 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 loext:marker-style-name="T9"><text:span text:style-name="T10">Sample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Specification Range (Be)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Date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Calibration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Na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0 - 120 (76 - 124)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Mg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5 - 115 (80 - 120)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Al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Si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P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K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Ca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Ti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V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Cr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Mn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Fe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Ni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Cu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Zn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Mo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Ag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4 - 116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Cd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4 - 116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Sn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Sb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Ba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8" loext:marker-style-name="T9"><text:span text:style-name="T10">Pb (PPM)</text:span><text:span text:style-name="T10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><text:span text:style-name="T11"/></text:p>
          </table:table-cell>
          <table:table-cell table:style-name="Table2.A1" office:value-type="string">
            <text:p text:style-name="P8" loext:marker-style-name="T9"><text:span text:style-name="T10">89 - 111</text:span><text:span text:style-name="T10"/></text:p>
          </table:table-cell>
        </table:table-row>
      </table:table>
      <text:p text:style-name="P12"/>
      <text:h text:style-name="P11" text:outline-level="2"><text:span text:style-name="T6">1.3</text:span><text:span text:style-name="T5"><text:tab/></text:span><text:span text:style-name="T12">QC XRS1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 loext:marker-style-name="T9"><text:span text:style-name="T10">Sample</text:span><text:span text:style-name="T10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 loext:marker-style-name="T9"><text:span text:style-name="T10">Specification Range</text:span><text:span text:style-name="T10"/></text:p>
          </table:table-cell>
        </table:table-row>
        <table:table-row table:style-name="Table5.1">
          <table:table-cell table:style-name="Table5.A1" office:value-type="string">
            <text:p text:style-name="P8" loext:marker-style-name="T9"><text:span text:style-name="T10">Date</text:span><text:span text:style-name="T10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8" loext:marker-style-name="T9"><text:span text:style-name="T10">Calibration</text:span><text:span text:style-name="T10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8" loext:marker-style-name="T9"><text:span text:style-name="T10">S (%)</text:span><text:span text:style-name="T10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 loext:marker-style-name="T9"><text:span text:style-name="T10">0.0089 - 0.0111</text:span><text:span text:style-name="T10"/></text:p>
          </table:table-cell>
        </table:table-row>
        <table:table-row table:style-name="Table5.1">
          <table:table-cell table:style-name="Table5.A1" office:value-type="string">
            <text:p text:style-name="P8" loext:marker-style-name="T9"><text:span text:style-name="T10">Cl (PPM)</text:span><text:span text:style-name="T10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5.1">
          <table:table-cell table:style-name="Table5.A1" office:value-type="string">
            <text:p text:style-name="P8" loext:marker-style-name="T9"><text:span text:style-name="T10">Br (PPM)</text:span><text:span text:style-name="T10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5.1">
          <table:table-cell table:style-name="Table5.A1" office:value-type="string">
            <text:p text:style-name="P8" loext:marker-style-name="T9"><text:span text:style-name="T10">Zr (PPM)</text:span><text:span text:style-name="T10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><text:span text:style-name="T11"/></text:p>
          </table:table-cell>
          <table:table-cell table:style-name="Table5.A1" office:value-type="string">
            <text:p text:style-name="P8" loext:marker-style-name="T9"><text:span text:style-name="T10">89 - 111</text:span><text:span text:style-name="T10"/></text:p>
          </table:table-cell>
        </table:table-row>
      </table:table>
      <text:p text:style-name="P10"/>
      <text:h text:style-name="P11" text:outline-level="2"><text:span text:style-name="T13">1.</text:span>4<text:span text:style-name="T5"><text:tab/></text:span><text:span text:style-name="T14">QC XRS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Sample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 loext:marker-style-name="T9"><text:span text:style-name="T10">Specification Range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8" loext:marker-style-name="T9"><text:span text:style-name="T10">Date</text:span><text:span text:style-name="T10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 loext:marker-style-name="T9"><text:span text:style-name="T10">Calibration</text:span><text:span text:style-name="T10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 loext:marker-style-name="T9"><text:span text:style-name="T10">Co (PPM)</text:span><text:span text:style-name="T10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8" loext:marker-style-name="T9"><text:span text:style-name="T10">As (PPM)</text:span><text:span text:style-name="T10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8" loext:marker-style-name="T9"><text:span text:style-name="T10">In (PPM)</text:span><text:span text:style-name="T10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8" loext:marker-style-name="T9"><text:span text:style-name="T10">W (PPM)</text:span><text:span text:style-name="T10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8" loext:marker-style-name="T9"><text:span text:style-name="T10">Tl (PPM)</text:span><text:span text:style-name="T10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 loext:marker-style-name="T9"><text:span text:style-name="T10">89 - 111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8" loext:marker-style-name="T9"><text:span text:style-name="T10">Bi (PPM)</text:span><text:span text:style-name="T10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><text:span text:style-name="T11"/></text:p>
          </table:table-cell>
          <table:table-cell table:style-name="Table4.A1" office:value-type="string">
            <text:p text:style-name="P8" loext:marker-style-name="T9"><text:span text:style-name="T10">89 - 111</text:span><text:span text:style-name="T10"/></text:p>
          </table:table-cell>
        </table:table-row>
      </table:table>
      <text:p text:style-name="P14"/>
      <text:p text:style-name="P15">The above-mentioned spectrometer system passed this Analytical Acceptance Test.</text:p>
      <text:p text:style-name="P15"/>
      <text:p text:style-name="P16"><text:span text:style-name="T15">Date:<text:tab/><text:tab/><text:tab/><text:tab/></text:span><text:span text:style-name="T16">Signature</text:span><text:span text:style-name="T15">:<text:tab/><text:tab/><text:tab/><text:tab/></text:span><text:span text:style-name="T16">Full name:</text:span></text:p>
      <text:p text:style-name="P17" loext:marker-style-name="T17"><text:span text:style-name="T18"/></text:p>
      <text:p text:style-name="P18" loext:marker-style-name="T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Fett" svg:font-family="'Arial Fett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fals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000000" loext:opacity="100%" style:font-name="Arial" fo:font-family="Arial" style:font-family-generic="roman" style:font-pitch="variable"/>
    </style:style>
    <style:style style:name="List" style:family="paragraph" style:parent-style-name="Standard" style:class="list">
      <style:paragraph-properties fo:margin-left="0.499cm" fo:margin-top="0cm" fo:margin-bottom="0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53cm" fo:margin-bottom="0.212cm" style:contextual-spacing="false" fo:keep-with-next="always"/>
      <style:text-properties fo:color="#006cb0" loext:opacity="100%" style:font-name="Arial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.212cm" style:contextual-spacing="false" fo:keep-with-next="always"/>
      <style:text-properties fo:color="#006cb0" loext:opacity="100%" style:font-name="Arial Fett" fo:font-family="'Arial Fett'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cm" fo:margin-bottom="0.212cm" style:contextual-spacing="false" fo:keep-with-next="always"/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Organisationsz" style:family="paragraph" style:next-style-name="Footer">
      <style:paragraph-properties fo:margin-top="0.212cm" fo:margin-bottom="0cm" style:contextual-spacing="false" style:line-height-at-least="0.212cm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7pt" fo:language="de" fo:country="DE" style:letter-kerning="false" style:font-name-asian="Times New Roman1" style:font-family-asian="'Times New Roman'" style:font-family-generic-asian="system" style:font-pitch-asian="variable" style:font-size-asian="7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lain_20_Text1" style:display-name="Plain Text1" style:family="paragraph" style:parent-style-name="Standard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orphans="0" fo:widows="0"/>
      <style:text-properties fo:color="#000000" loext:opacity="100%"/>
    </style:style>
    <style:style style:name="b_5f_body" style:display-name="b_body" style:family="paragraph" style:parent-style-name="Standard" loext:linked-style-name="b_5f_body_20_Char">
      <style:paragraph-properties fo:margin-top="0.212cm" fo:margin-bottom="0.212cm" style:contextual-spacing="false" fo:line-height="108%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n_5f_procedure_5f_next" style:display-name="pn_procedure_next" style:family="paragraph" style:parent-style-name="Standard" loext:linked-style-name="pn_5f_procedure_5f_next_20_Char" style:list-style-name="WWNum1" style:list-level="1">
      <style:paragraph-properties fo:margin-top="0.106cm" fo:margin-bottom="0.106cm" style:contextual-spacing="false" fo:line-height="108%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b" style:family="paragraph" style:parent-style-name="Text_20_body">
      <style:text-properties fo:language="en" fo:country="GB"/>
    </style:style>
    <style:style style:name="lb_5f_liste_5f_bullet" style:display-name="lb_liste_bullet" style:family="paragraph" style:parent-style-name="b_5f_body" style:list-style-name="WWNum2" style:list-level="1"/>
    <style:style style:name="Revision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fals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Simple_20_1" style:display-name="Table Simple 1" style:family="paragraph" style:parent-style-name="Normal_20_Table_20__28_WW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b_5f_body_20_Char" style:display-name="b_body Char" style:family="text" style:parent-style-name="Default_20_Paragraph_20_Font_20__28_WW_29_" loext:linked-style-name="b_5f_body"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n_5f_procedure_5f_next_20_Char" style:display-name="pn_procedure_next Char" style:family="text" style:parent-style-name="Default_20_Paragraph_20_Font_20__28_WW_29_" loext:linked-style-name="pn_5f_procedure_5f_next"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2" style:display-name="ListLabel 2" style:family="text">
      <style:text-properties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0070c0" loext:opacity="100%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20" style:display-name="ListLabel 20" style:family="text">
      <style:text-properties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38" style:display-name="ListLabel 38" style:family="text">
      <style:text-properties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3pt solid #0071bc"/>
    </style:style>
    <style:style style:name="MP2" style:family="paragraph" style:parent-style-name="Footer">
      <style:paragraph-properties fo:margin-right="-0.002cm" fo:padding="0cm" fo:border-left="none" fo:border-right="none" fo:border-top="3pt solid #0071bc" fo:border-bottom="none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>
      <loext:graphic-properties draw:fill="none"/>
      <style:paragraph-properties fo:text-align="left"/>
      <style:text-properties fo:color="#000000" loext:opacity="100%" fo:font-size="18pt"/>
    </style:style>
    <style:style style:name="MT1" style:family="text">
      <style:text-properties style:font-name="Arial" fo:font-size="15pt" fo:language="en" fo:country="GB" style:font-size-asian="15pt"/>
    </style:style>
    <style:style style:name="MT2" style:family="text">
      <style:text-properties style:font-name="Arial" fo:font-size="15pt" fo:language="en" fo:country="GB" officeooo:rsid="002a3ea1" style:font-size-asian="15pt"/>
    </style:style>
    <style:style style:name="MT3" style:family="text">
      <style:text-properties style:font-name="Arial" fo:font-size="14pt" fo:language="en" fo:country="GB" style:font-size-asian="14pt"/>
    </style:style>
    <style:style style:name="MT4" style:family="text">
      <style:text-properties style:font-name="Arial" fo:language="en" fo:country="GB" fo:font-weight="bold" style:font-weight-asian="bold" style:font-name-complex="Arial2"/>
    </style:style>
    <style:style style:name="MT5" style:family="text">
      <style:text-properties fo:color="#000000" loext:opacity="100%" style:font-name="Calibri" fo:font-size="8pt" style:font-size-asian="8pt" style:font-family-complex="Calibri" style:font-family-generic-complex="system" style:font-pitch-complex="variable"/>
    </style:style>
    <style:style style:name="MT6" style:family="text">
      <style:text-properties style:font-name="Arial" fo:language="en" fo:country="GB" fo:font-weight="bold" style:font-weight-asian="bold"/>
    </style:style>
    <style:style style:name="MT7" style:family="text">
      <style:text-properties style:font-name="Arial" fo:font-weight="bold" style:font-weight-asian="bold" style:font-name-complex="Arial2"/>
    </style:style>
    <style:style style:name="MT8" style:family="text">
      <style:text-properties style:font-name="Arial" fo:language="en" fo:country="US" fo:font-weight="bold" style:font-weight-asian="bold" style:font-name-complex="Arial2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0.73cm" fo:margin-left="2.501cm" fo:margin-right="2.501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0.52cm" fo:margin-left="0cm" fo:margin-right="0cm" fo:margin-top="0.4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Bild 1" text:anchor-type="char" svg:x="12.882cm" svg:y="0.007cm" svg:width="3.201cm" svg:height="1.693cm" draw:z-index="5"><draw:image xlink:href="Pictures/10000000000002B80000017348A2EA88.jpg" xlink:type="simple" xlink:show="embed" xlink:actuate="onLoad" draw:mime-type="image/jpeg"/><svg:desc>logo_rgb_300dpi</svg:desc><draw:contour-polygon svg:width="5.819cm" svg:height="3.051cm" svg:viewBox="0 0 5819 3051" draw:points="20,0 20,3051 5839,3051 5839,0" draw:recreate-on-edit="false"/></draw:frame><text:span text:style-name="MT2">PETRO-QUANT 4.1 (Be)</text:span><text:span text:style-name="MT1"> – Acceptance Test</text:span></text:p>
        <text:p text:style-name="MP1" loext:marker-style-name="MT1"><text:span text:style-name="MT3"/></text:p>
      </style:header>
      <style:footer>
        <text:p text:style-name="MP2" loext:marker-style-name="MT4"><draw:custom-shape text:anchor-type="char" draw:z-index="1" draw:name="MSIPCMdf6540f7a3b1048952b5c2cb" draw:style-name="Mgr1" draw:text-style-name="MP4" svg:width="21.003cm" svg:height="0.759cm" svg:x="0cm" svg:y="28.414cm"><svg:desc>{"HashCode":-527952489,"Height":842.0,"Width":595.0,"Placement":"Footer","Index":"Primary","Section":1,"Top":0.0,"Left":0.0}</svg:desc><text:p text:style-name="MP3" loext:marker-style-name="MT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6">File in Instrument Supplement Folder and forward to local Service Support <text:tab/>Page </text:span><text:span text:style-name="page_20_number"><text:span text:style-name="MT7"><text:page-number text:select-page="current">2</text:page-number></text:span></text:span><text:span text:style-name="page_20_number"><text:span text:style-name="MT8"><text:s/>of </text:span></text:span><text:span text:style-name="page_20_number"><text:span text:style-name="MT7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24:00</meta:creation-date>
    <meta:initial-creator>Uwe Metka</meta:initial-creator>
    <dc:language>en-US</dc:language>
    <meta:print-date>2026-02-10T15:45:00</meta:print-date>
    <dc:date>2026-06-09T12:21:01.262926100</dc:date>
    <meta:editing-cycles>72</meta:editing-cycles>
    <dc:title>A55X-X26-R01 Acceptance Test</dc:title>
    <meta:editing-duration>P6DT15H54M58S</meta:editing-duration>
    <meta:generator>LibreOffice/26.2.3.2$Windows_X86_64 LibreOffice_project/70e089b17412e4cb7773e41413306b17a2328c34</meta:generator>
    <meta:document-statistic meta:table-count="5" meta:image-count="1" meta:object-count="0" meta:page-count="2" meta:paragraph-count="157" meta:word-count="415" meta:character-count="1731" meta:non-whitespace-character-count="1464"/>
    <meta:user-defined meta:name="AppVersion">15.0000</meta:user-defined>
    <meta:user-defined meta:name="Company">Siemens AG</meta:user-defined>
    <meta:user-defined meta:name="MSIP_Label_e340eb20-1c5f-4409-b1a4-85adc943d5d7_ActionId">ed9428ed-c856-4eac-b2d0-20bae494b2f9</meta:user-defined>
    <meta:user-defined meta:name="MSIP_Label_e340eb20-1c5f-4409-b1a4-85adc943d5d7_ContentBits">2</meta:user-defined>
    <meta:user-defined meta:name="MSIP_Label_e340eb20-1c5f-4409-b1a4-85adc943d5d7_Enabled" meta:value-type="string">true</meta:user-defined>
    <meta:user-defined meta:name="MSIP_Label_e340eb20-1c5f-4409-b1a4-85adc943d5d7_Method" meta:value-type="string">Standard</meta:user-defined>
    <meta:user-defined meta:name="MSIP_Label_e340eb20-1c5f-4409-b1a4-85adc943d5d7_Name" meta:value-type="string">Confidential</meta:user-defined>
    <meta:user-defined meta:name="MSIP_Label_e340eb20-1c5f-4409-b1a4-85adc943d5d7_SetDate" meta:value-type="string">2025-08-14T13:25:26Z</meta:user-defined>
    <meta:user-defined meta:name="MSIP_Label_e340eb20-1c5f-4409-b1a4-85adc943d5d7_SiteId" meta:value-type="string">375ce1b8-8db1-479b-a12c-06fa9d2a2eaf</meta:user-defined>
    <meta:template xlink:type="simple" xlink:actuate="onRequest" xlink:title="Normal.dotm" xlink:href=""/>
  </office:meta>
</office:document-meta>
</file>